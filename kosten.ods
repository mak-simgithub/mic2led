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os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fiBerry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B2]*[.C2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aspi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3]*[.C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m Module kle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mpe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table:formula="of:=[.B6]*[.C6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abel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[.B7]*[.C7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teckdose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  <table:table-cell table:formula="of:=[.B8]*[.C8]"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Gehäuse</text:p>
          </table:table-cell>
          <table:table-cell table:number-columns-repeated="2"/>
          <table:table-cell table:formula="of:=[.B9]*[.C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 Module gros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tzteil + Buchse</text:p>
          </table:table-cell>
          <table:table-cell table:number-columns-repeated="2"/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Kaltgerätekabel</text:p>
          </table:table-cell>
          <table:table-cell table:number-columns-repeated="2"/>
          <table:table-cell table:formula="of:=[.B12]*[.C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table:number-columns-repeated="2"/>
          <table:table-cell table:formula="of:=[.B13]*[.C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2:.D13])" office:value-type="float" office:value="385.9" calcext:value-type="float">
            <text:p>385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13:29:24.6523470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22:32:15.502583318</meta:creation-date>
    <dc:date>2026-04-12T13:35:50.745299874</dc:date>
    <meta:editing-duration>PT24M43S</meta:editing-duration>
    <meta:editing-cycles>7</meta:editing-cycles>
    <meta:generator>LibreOffice/24.2.7.2$Linux_X86_64 LibreOffice_project/420$Build-2</meta:generator>
    <meta:document-statistic meta:table-count="1" meta:cell-count="42" meta:object-count="0"/>
  </office:meta>
</office:document-meta>
</file>